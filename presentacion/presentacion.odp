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4BA38C90627.jpg" manifest:media-type="image/jpeg"/>
  <manifest:file-entry manifest:full-path="Pictures/100000000000024600000240DE8C9777.jpg" manifest:media-type="image/jpeg"/>
  <manifest:file-entry manifest:full-path="Pictures/10000001000014FD000005D96BAE67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Inter" svg:font-family="In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2.985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>
      <style:graphic-properties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 loext:decorative="false"/>
      <style:paragraph-properties style:writing-mode="lr-tb"/>
    </style:style>
    <style:style style:name="gr8" style:family="graphic" style:parent-style-name="standard">
      <style:graphic-properties draw:fill="solid" draw:fill-color="#b01c2e" draw:textarea-horizontal-align="justify" draw:textarea-vertical-align="middle" draw:auto-grow-height="false" fo:min-height="0.25cm" fo:min-width="12.5cm" loext:glow-radius="0cm" loext:softedge-radius="0cm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top="0.42cm" fo:margin-bottom="0.35cm" fo:text-align="justify"/>
      <style:text-properties fo:font-size="10pt" fo:language="es" fo:country="ES" style:font-size-asian="10pt" style:font-size-complex="10pt"/>
    </style:style>
    <style:style style:name="P2" style:family="paragraph">
      <loext:graphic-properties draw:fill="none" draw:fill-color="#ffffff"/>
      <style:paragraph-properties fo:margin-top="0.42cm" fo:margin-bottom="0.35cm" fo:text-align="justify"/>
      <style:text-properties style:font-name="Inter" fo:font-size="10pt" fo:language="es" fo:country="ES" fo:font-weight="bold" style:font-size-asian="10pt" style:font-weight-asian="bold" style:font-size-complex="10pt" style:font-weight-complex="bold"/>
    </style:style>
    <style:style style:name="P3" style:family="paragraph">
      <style:text-properties style:font-name="Inter"/>
    </style:style>
    <style:style style:name="P4" style:family="paragraph">
      <loext:graphic-properties draw:fill="none" draw:fill-color="#ffffff"/>
      <style:text-properties style:font-name="Inter" fo:font-size="24pt" fo:font-style="italic" style:font-size-asian="24pt" style:font-style-asian="italic" style:font-size-complex="24pt" style:font-style-complex="italic"/>
    </style:style>
    <style:style style:name="P5" style:family="paragraph">
      <style:text-properties fo:color="#b01c2e" loext:opacity="100%" style:font-name="Inter"/>
    </style:style>
    <style:style style:name="P6" style:family="paragraph">
      <loext:graphic-properties draw:fill="none" draw:fill-color="#ffffff"/>
      <style:text-properties fo:color="#b01c2e" loext:opacity="100%" style:font-name="Inter"/>
    </style:style>
    <style:style style:name="P7" style:family="paragraph">
      <loext:graphic-properties draw:fill-color="#ffffff"/>
      <style:text-properties fo:language="es" fo:country="ES"/>
    </style:style>
    <style:style style:name="P8" style:family="paragraph">
      <style:paragraph-properties fo:text-align="center"/>
    </style:style>
    <style:style style:name="P9" style:family="paragraph">
      <style:text-properties fo:color="#666666" loext:opacity="100%" style:font-name="Inter" fo:font-size="11pt" style:font-size-asian="11pt" style:font-size-complex="11pt"/>
    </style:style>
    <style:style style:name="P10" style:family="paragraph">
      <loext:graphic-properties draw:fill="none" draw:fill-color="#ffffff"/>
      <style:text-properties fo:color="#666666" loext:opacity="100%" style:font-name="Inter" fo:font-size="11pt" style:font-size-asian="11pt" style:font-size-complex="11pt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text-properties style:font-name="Inter"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solid" draw:fill-color="#b01c2e"/>
      <style:paragraph-properties fo:text-align="center"/>
      <style:text-properties style:font-name="Inter"/>
    </style:style>
    <style:style style:name="T1" style:family="text">
      <style:text-properties fo:font-size="30pt" fo:font-weight="bold" style:font-size-asian="30pt" style:font-weight-asian="bold" style:font-size-complex="30pt" style:font-weight-complex="bold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color="#b01c2e" loext:opacity="100%"/>
    </style:style>
    <style:style style:name="T4" style:family="text">
      <style:text-properties fo:color="#666666" loext:opacity="100%" fo:font-size="11pt" style:font-size-asian="11pt" style:font-size-complex="11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1.5cm" svg:height="3.235cm" svg:x="1.347cm" svg:y="5.189cm">
          <draw:text-box>
            <text:p text:style-name="P1"><text:span text:style-name="T1">Análisis del efecto de la difracción en la </text:span></text:p>
            <text:p text:style-name="P1"><text:span text:style-name="T1">estimación del campo magnético solar</text:span></text:p>
          </draw:text-box>
        </draw:frame>
        <draw:frame draw:style-name="gr2" draw:text-style-name="P4" draw:layer="layout" svg:width="10.547cm" svg:height="1.275cm" svg:x="1.5cm" svg:y="8.424cm">
          <draw:text-box>
            <text:p text:style-name="P3"><text:span text:style-name="T2">Pablo Orellana Chornyak</text:span></text:p>
          </draw:text-box>
        </draw:frame>
        <draw:frame draw:style-name="gr2" draw:text-style-name="P6" draw:layer="layout" svg:width="11.303cm" svg:height="1.017cm" svg:x="1.453cm" svg:y="9.983cm">
          <draw:text-box>
            <text:p text:style-name="P5"><text:span text:style-name="T3">T</text:span><text:span text:style-name="T3">r</text:span><text:span text:style-name="T3">a</text:span><text:span text:style-name="T3">b</text:span><text:span text:style-name="T3">a</text:span><text:span text:style-name="T3">j</text:span><text:span text:style-name="T3">o</text:span><text:span text:style-name="T3"> </text:span><text:span text:style-name="T3">d</text:span><text:span text:style-name="T3">e</text:span><text:span text:style-name="T3"> </text:span><text:span text:style-name="T3">F</text:span><text:span text:style-name="T3">i</text:span><text:span text:style-name="T3">n</text:span><text:span text:style-name="T3"> </text:span><text:span text:style-name="T3">d</text:span><text:span text:style-name="T3">e</text:span><text:span text:style-name="T3"> </text:span><text:span text:style-name="T3">G</text:span><text:span text:style-name="T3">r</text:span><text:span text:style-name="T3">a</text:span><text:span text:style-name="T3">d</text:span><text:span text:style-name="T3">o</text:span><text:span text:style-name="T3"> </text:span><text:span text:style-name="T3">2</text:span><text:span text:style-name="T3">0</text:span><text:span text:style-name="T3">2</text:span><text:span text:style-name="T3">5</text:span><text:span text:style-name="T3">-</text:span><text:span text:style-name="T3">2</text:span><text:span text:style-name="T3">0</text:span><text:span text:style-name="T3">2</text:span><text:span text:style-name="T3">6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g draw:style-name="gr4">
          <draw:frame draw:name="vscfsd" draw:style-name="gr5" draw:text-style-name="P8" draw:layer="layout" svg:width="9.094cm" svg:height="9cm" svg:x="3.406cm" svg:y="4.5cm">
            <draw:image xlink:href="Pictures/100000000000024600000240DE8C9777.jpg" xlink:type="simple" xlink:show="embed" xlink:actuate="onLoad" draw:mime-type="image/jpeg">
              <text:p/>
            </draw:image>
          </draw:frame>
          <draw:frame draw:style-name="gr6" draw:text-style-name="P10" draw:layer="layout" svg:width="7.415cm" svg:height="0.721cm" svg:x="3.406cm" svg:y="13.5cm">
            <draw:text-box>
              <text:p text:style-name="P9"><text:span text:style-name="T4">Fuente: </text:span><text:span text:style-name="T4"><text:a xlink:href="https://svs.gsfc.nasa.gov/4715/" xlink:type="simple">Nasa Scientific Visualization</text:a>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g draw:style-name="gr4">
          <draw:frame draw:name="vscfsd" draw:style-name="gr5" draw:text-style-name="P8" draw:layer="layout" svg:width="9.094cm" svg:height="9cm" svg:x="3.406cm" svg:y="4.5cm">
            <draw:image xlink:href="Pictures/100000000000024600000240DE8C9777.jpg" xlink:type="simple" xlink:show="embed" xlink:actuate="onLoad" draw:mime-type="image/jpeg">
              <text:p/>
            </draw:image>
          </draw:frame>
          <draw:frame draw:style-name="gr6" draw:text-style-name="P10" draw:layer="layout" svg:width="7.415cm" svg:height="0.721cm" svg:x="3.406cm" svg:y="13.5cm">
            <draw:text-box>
              <text:p text:style-name="P9"><text:span text:style-name="T4">Fuente: </text:span><text:span text:style-name="T4"><text:a xlink:href="https://svs.gsfc.nasa.gov/4715/" xlink:type="simple">Nasa Scientific Visualization</text:a></text:span></text:p>
            </draw:text-box>
          </draw:frame>
        </draw:g>
        <draw:g draw:style-name="gr4">
          <draw:frame draw:name="vscfsd" draw:style-name="gr5" draw:text-style-name="P8" draw:layer="layout" svg:width="9.094cm" svg:height="9cm" svg:x="16cm" svg:y="4.5cm">
            <draw:image xlink:href="Pictures/10000000000004B0000004BA38C90627.jpg" xlink:type="simple" xlink:show="embed" xlink:actuate="onLoad" draw:mime-type="image/jpeg">
              <text:p/>
            </draw:image>
          </draw:frame>
          <draw:frame draw:style-name="gr7" draw:text-style-name="P10" draw:layer="layout" svg:width="8.5cm" svg:height="0.721cm" svg:x="16cm" svg:y="13.5cm">
            <draw:text-box>
              <text:p text:style-name="P9"><text:span text:style-name="T4">Fuente: </text:span><text:span text:style-name="T4"><text:a xlink:href="https://www.upm.es/?id=CON13256&amp;prefmt=articulo&amp;fmt=detail" xlink:type="simple">Universidad Politecnica de Madrid</text:a></text:span></text:p>
            </draw:text-box>
          </draw:frame>
        </draw:g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12" draw:layer="layout" svg:width="5.498cm" svg:height="1.445cm" svg:x="3cm" svg:y="2cm">
          <draw:text-box>
            <text:p text:style-name="P3"><text:span text:style-name="T5">Contenido</text:span></text:p>
          </draw:text-box>
        </draw:frame>
        <draw:custom-shape draw:style-name="gr8" draw:text-style-name="P13" draw:layer="layout" svg:width="13cm" svg:height="0.5cm" svg:x="3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Inter" svg:font-family="In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Inter" fo:font-family="Inte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Inter" fo:font-family="Inter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Inter" fo:font-family="Inter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Inter" fo:font-family="Inter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Inter" fo:font-family="Inter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Inter" fo:font-family="Inter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Inter" fo:font-family="Inter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Inter" fo:font-family="Inter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Default-outline1">
      <style:graphic-properties fo:min-height="0.101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301cm" svg:y="3.5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9cm" svg:height="2.508cm" svg:x="18cm" svg:y="1cm">
        <draw:image xlink:href="Pictures/10000001000014FD000005D96BAE6790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4T15:44:42.536448887</meta:creation-date>
    <dc:date>2026-07-14T18:32:52.152201367</dc:date>
    <meta:editing-duration>PT1H20M47S</meta:editing-duration>
    <meta:editing-cycles>5</meta:editing-cycles>
    <meta:generator>LibreOffice/26.2.4.2$Linux_X86_64 LibreOffice_project/620$Build-2</meta:generator>
    <meta:document-statistic meta:object-count="44"/>
  </office:meta>
</office:document-meta>
</file>